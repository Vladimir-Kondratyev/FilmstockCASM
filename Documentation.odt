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09b1e1" officeooo:paragraph-rsid="0009b1e1" style:font-size-asian="18pt" style:font-weight-asian="bold" style:font-size-complex="18pt" style:font-weight-complex="bold"/>
    </style:style>
    <style:style style:name="P2" style:family="paragraph" style:parent-style-name="Standard">
      <style:text-properties officeooo:rsid="0009b1e1" officeooo:paragraph-rsid="0009b1e1"/>
    </style:style>
    <style:style style:name="P3" style:family="paragraph" style:parent-style-name="Standard">
      <style:text-properties officeooo:rsid="000b3de1" officeooo:paragraph-rsid="000b3de1"/>
    </style:style>
    <style:style style:name="P4" style:family="paragraph" style:parent-style-name="Standard">
      <style:text-properties fo:font-size="16pt" style:text-underline-style="solid" style:text-underline-width="auto" style:text-underline-color="font-color" fo:font-weight="bold" officeooo:rsid="000b3de1" officeooo:paragraph-rsid="000b3de1" style:font-size-asian="16pt" style:font-weight-asian="bold" style:font-size-complex="16pt" style:font-weight-complex="bold"/>
    </style:style>
    <style:style style:name="P5" style:family="paragraph" style:parent-style-name="Standard">
      <style:text-properties fo:font-style="italic" officeooo:rsid="000b3de1" officeooo:paragraph-rsid="000b3de1" style:font-style-asian="italic" style:font-style-complex="italic"/>
    </style:style>
    <style:style style:name="P6" style:family="paragraph" style:parent-style-name="Standard">
      <style:text-properties officeooo:rsid="000b3de1" officeooo:paragraph-rsid="00222a87"/>
    </style:style>
    <style:style style:name="P7" style:family="paragraph" style:parent-style-name="Standard">
      <style:text-properties officeooo:rsid="00222a87" officeooo:paragraph-rsid="00222a87"/>
    </style:style>
    <style:style style:name="P8" style:family="paragraph" style:parent-style-name="Standard">
      <style:text-properties officeooo:rsid="002ee221" officeooo:paragraph-rsid="002ee221"/>
    </style:style>
    <style:style style:name="P9" style:family="paragraph" style:parent-style-name="Standard">
      <style:text-properties fo:font-style="normal" officeooo:rsid="000b3de1" officeooo:paragraph-rsid="000b3de1" style:font-style-asian="normal" style:font-style-complex="normal"/>
    </style:style>
    <style:style style:name="P10" style:family="paragraph" style:parent-style-name="Standard">
      <style:text-properties fo:font-style="normal" officeooo:rsid="00113e53" officeooo:paragraph-rsid="001e49d0" style:font-style-asian="normal" style:font-style-complex="normal"/>
    </style:style>
    <style:style style:name="P11" style:family="paragraph" style:parent-style-name="Standard">
      <style:text-properties fo:font-style="normal" officeooo:rsid="000b3de1" officeooo:paragraph-rsid="0024069d" style:font-style-asian="normal" style:font-style-complex="normal"/>
    </style:style>
    <style:style style:name="P12" style:family="paragraph" style:parent-style-name="Standard">
      <style:text-properties fo:font-style="normal" officeooo:rsid="000b3de1" officeooo:paragraph-rsid="001e49d0" style:font-style-asian="normal" style:font-style-complex="normal"/>
    </style:style>
    <style:style style:name="P13" style:family="paragraph" style:parent-style-name="Standard">
      <style:text-properties fo:font-style="normal" officeooo:rsid="00210607" officeooo:paragraph-rsid="00210607" style:font-style-asian="normal" style:font-style-complex="normal"/>
    </style:style>
    <style:style style:name="P14" style:family="paragraph" style:parent-style-name="Standard">
      <style:text-properties fo:font-style="normal" officeooo:rsid="00210607" officeooo:paragraph-rsid="00222a87" style:font-style-asian="normal" style:font-style-complex="normal"/>
    </style:style>
    <style:style style:name="P15" style:family="paragraph" style:parent-style-name="Standard">
      <style:text-properties fo:font-style="normal" officeooo:rsid="00210607" officeooo:paragraph-rsid="0024aeef" style:font-style-asian="normal" style:font-style-complex="normal"/>
    </style:style>
    <style:style style:name="P16" style:family="paragraph" style:parent-style-name="Standard">
      <style:text-properties fo:font-style="normal" officeooo:rsid="0024069d" officeooo:paragraph-rsid="0024069d" style:font-style-asian="normal" style:font-style-complex="normal"/>
    </style:style>
    <style:style style:name="P17" style:family="paragraph" style:parent-style-name="Standard">
      <style:text-properties fo:font-style="normal" officeooo:rsid="00113e53" officeooo:paragraph-rsid="0024069d" style:font-style-asian="normal" style:font-style-complex="normal"/>
    </style:style>
    <style:style style:name="P18" style:family="paragraph" style:parent-style-name="Standard">
      <style:text-properties fo:font-style="normal" style:text-underline-style="solid" style:text-underline-width="auto" style:text-underline-color="font-color" fo:font-weight="bold" officeooo:rsid="000b3de1" officeooo:paragraph-rsid="000b3de1" style:font-style-asian="normal" style:font-weight-asian="bold" style:font-style-complex="normal" style:font-weight-complex="bold"/>
    </style:style>
    <style:style style:name="P19" style:family="paragraph" style:parent-style-name="Standard">
      <style:text-properties fo:font-style="normal" officeooo:rsid="000b3de1" officeooo:paragraph-rsid="000c8888" style:font-style-asian="normal" style:font-style-complex="normal"/>
    </style:style>
    <style:style style:name="P20" style:family="paragraph" style:parent-style-name="Standard">
      <style:text-properties fo:font-style="normal" style:text-underline-style="solid" style:text-underline-width="auto" style:text-underline-color="font-color" fo:font-weight="bold" officeooo:rsid="000e5ded" officeooo:paragraph-rsid="000e5ded" style:font-style-asian="normal" style:font-weight-asian="bold" style:font-style-complex="normal" style:font-weight-complex="bold"/>
    </style:style>
    <style:style style:name="P21" style:family="paragraph" style:parent-style-name="Standard">
      <style:text-properties fo:font-style="normal" officeooo:rsid="000b3de1" officeooo:paragraph-rsid="000e5ded" style:font-style-asian="normal" style:font-style-complex="normal"/>
    </style:style>
    <style:style style:name="P22" style:family="paragraph" style:parent-style-name="Standard">
      <style:text-properties fo:font-style="normal" officeooo:rsid="000e5ded" officeooo:paragraph-rsid="000e5ded" style:font-style-asian="normal" style:font-style-complex="normal"/>
    </style:style>
    <style:style style:name="P23" style:family="paragraph" style:parent-style-name="Standard">
      <style:text-properties fo:font-style="normal" officeooo:rsid="000f1996" officeooo:paragraph-rsid="000f1996" style:font-style-asian="normal" style:font-style-complex="normal"/>
    </style:style>
    <style:style style:name="P24" style:family="paragraph" style:parent-style-name="Standard">
      <style:text-properties fo:font-style="normal" officeooo:rsid="00113e53" officeooo:paragraph-rsid="00177276" style:font-style-asian="normal" style:font-style-complex="normal"/>
    </style:style>
    <style:style style:name="P25" style:family="paragraph" style:parent-style-name="Standard">
      <style:text-properties fo:font-style="normal" officeooo:rsid="00113e53" officeooo:paragraph-rsid="00113e53" style:font-style-asian="normal" style:font-style-complex="normal"/>
    </style:style>
    <style:style style:name="P26" style:family="paragraph" style:parent-style-name="Standard">
      <style:text-properties fo:font-style="normal" officeooo:rsid="00113e53" officeooo:paragraph-rsid="0015e0be" style:font-style-asian="normal" style:font-style-complex="normal"/>
    </style:style>
    <style:style style:name="P27" style:family="paragraph" style:parent-style-name="Standard">
      <style:text-properties fo:font-style="normal" officeooo:rsid="00113e53" officeooo:paragraph-rsid="0018d165" style:font-style-asian="normal" style:font-style-complex="normal"/>
    </style:style>
    <style:style style:name="P28" style:family="paragraph" style:parent-style-name="Standard">
      <style:text-properties fo:font-style="normal" officeooo:rsid="00113e53" officeooo:paragraph-rsid="00126f33" style:font-style-asian="normal" style:font-style-complex="normal"/>
    </style:style>
    <style:style style:name="P29" style:family="paragraph" style:parent-style-name="Standard">
      <style:text-properties fo:font-style="normal" officeooo:rsid="0013a7de" officeooo:paragraph-rsid="0013a7de" style:font-style-asian="normal" style:font-style-complex="normal"/>
    </style:style>
    <style:style style:name="P30" style:family="paragraph" style:parent-style-name="Standard">
      <style:text-properties fo:font-style="normal" officeooo:rsid="000fa923" officeooo:paragraph-rsid="0013a7de" style:font-style-asian="normal" style:font-style-complex="normal"/>
    </style:style>
    <style:style style:name="P31" style:family="paragraph" style:parent-style-name="Standard">
      <style:text-properties fo:font-style="normal" fo:font-weight="bold" officeooo:rsid="00126f33" officeooo:paragraph-rsid="00126f33" style:font-style-asian="normal" style:font-weight-asian="bold" style:font-style-complex="normal" style:font-weight-complex="bold"/>
    </style:style>
    <style:style style:name="P32" style:family="paragraph" style:parent-style-name="Standard" style:list-style-name="L1">
      <style:text-properties fo:font-style="normal" fo:font-weight="bold" officeooo:rsid="002d0ea9" officeooo:paragraph-rsid="002d0ea9" style:font-style-asian="normal" style:font-weight-asian="bold" style:font-style-complex="normal" style:font-weight-complex="bold"/>
    </style:style>
    <style:style style:name="P33" style:family="paragraph" style:parent-style-name="Standard" style:list-style-name="L2">
      <style:text-properties fo:font-style="normal" officeooo:rsid="00126f33" officeooo:paragraph-rsid="00126f33" style:font-style-asian="normal" style:font-style-complex="normal"/>
    </style:style>
    <style:style style:name="P34" style:family="paragraph" style:parent-style-name="Standard" style:list-style-name="L2">
      <style:text-properties fo:font-style="normal" officeooo:rsid="001f5bf3" officeooo:paragraph-rsid="001f5bf3" style:font-style-asian="normal" style:font-style-complex="normal"/>
    </style:style>
    <style:style style:name="P35" style:family="paragraph" style:parent-style-name="Standard" style:list-style-name="L2">
      <style:text-properties fo:font-style="normal" officeooo:rsid="002a7880" officeooo:paragraph-rsid="002a7880" style:font-style-asian="normal" style:font-style-complex="normal"/>
    </style:style>
    <style:style style:name="P36" style:family="paragraph" style:parent-style-name="Standard" style:list-style-name="L2">
      <style:text-properties fo:font-style="normal" officeooo:rsid="002b411d" officeooo:paragraph-rsid="002b411d" style:font-style-asian="normal" style:font-style-complex="normal"/>
    </style:style>
    <style:style style:name="T1" style:family="text">
      <style:text-properties officeooo:rsid="002fcec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officeooo:rsid="001536e9" style:font-style-asian="italic" style:font-style-complex="italic"/>
    </style:style>
    <style:style style:name="T5" style:family="text">
      <style:text-properties officeooo:rsid="001536e9"/>
    </style:style>
    <style:style style:name="T6" style:family="text">
      <style:text-properties officeooo:rsid="001c222e"/>
    </style:style>
    <style:style style:name="T7" style:family="text">
      <style:text-properties officeooo:rsid="001e0a2a"/>
    </style:style>
    <style:style style:name="T8" style:family="text">
      <style:text-properties officeooo:rsid="001e49d0"/>
    </style:style>
    <style:style style:name="T9" style:family="text">
      <style:text-properties officeooo:rsid="00113e53"/>
    </style:style>
    <style:style style:name="T10" style:family="text">
      <style:text-properties officeooo:rsid="00222a87"/>
    </style:style>
    <style:style style:name="T11" style:family="text">
      <style:text-properties officeooo:rsid="0024aeef"/>
    </style:style>
    <style:style style:name="T12" style:family="text">
      <style:text-properties officeooo:rsid="00210607"/>
    </style:style>
    <style:style style:name="T13" style:family="text">
      <style:text-properties officeooo:rsid="00264f2c"/>
    </style:style>
    <style:style style:name="T14" style:family="text">
      <style:text-properties officeooo:rsid="0024069d"/>
    </style:style>
    <style:style style:name="T15" style:family="text">
      <style:text-properties officeooo:rsid="000c8888"/>
    </style:style>
    <style:style style:name="T16" style:family="text">
      <style:text-properties officeooo:rsid="000e5ded"/>
    </style:style>
    <style:style style:name="T17" style:family="text">
      <style:text-properties officeooo:rsid="0015e0be"/>
    </style:style>
    <style:style style:name="T18" style:family="text">
      <style:text-properties officeooo:rsid="0018d165"/>
    </style:style>
    <style:style style:name="T19" style:family="text">
      <style:text-properties officeooo:rsid="00126f33"/>
    </style:style>
    <style:style style:name="T20" style:family="text">
      <style:text-properties officeooo:rsid="0010a0f5"/>
    </style:style>
    <style:style style:name="T21" style:family="text">
      <style:text-properties officeooo:rsid="00128daf"/>
    </style:style>
    <style:style style:name="T22" style:family="text">
      <style:text-properties officeooo:rsid="0013a7de"/>
    </style:style>
    <style:style style:name="T23" style:family="text">
      <style:text-properties officeooo:rsid="002870ba"/>
    </style:style>
    <style:style style:name="T24" style:family="text">
      <style:text-properties officeooo:rsid="002a07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the Film Stock programming language.</text:p>
      <text:p text:style-name="P2"/>
      <text:p text:style-name="P2">Film stock is a very simple toy programming language that revolves around the VM having a predefined stack size and having only one datatype: doubles. Your programming code gets compiled into Film Stock’s assembly, which is then assembled into its byte code.</text:p>
      <text:p text:style-name="P2"/>
      <text:p text:style-name="P2">There is no scoping, meaning that a variable at the end of your code is also accesible with the default value of 0 in the beginning of it, although this usage is not recommended.</text:p>
      <text:p text:style-name="P2"/>
      <text:p text:style-name="P3">When performing operations with variables, all of your variables get copied, meaning you could theoretically call sin(x) on its own but its value will not be used. However list operations (added in the next update) will not perform copies of the lists.</text:p>
      <text:p text:style-name="P3"/>
      <text:p text:style-name="P4">Limitations</text:p>
      <text:p text:style-name="P3">Due to the static memory allocation, recursive functions will malfunction and their usage is unrecommended. In the future I will add macros allowing you to write recursive functions with a set maximum depth.</text:p>
      <text:p text:style-name="P3"/>
      <text:p text:style-name="P3">My implementation allows functions to return only one value, so you may not write:</text:p>
      <text:p text:style-name="P5">“return 0, 2”</text:p>
      <text:p text:style-name="P3"/>
      <text:p text:style-name="P4">Syntax</text:p>
      <text:p text:style-name="P6">The current funtionallity of the language is as follows:<text:line-break/></text:p>
      <text:p text:style-name="P7">Statements are separated by new lines. You may leave as many new lines as you desire. This is functionally the same as Java’s ‘;’.</text:p>
      <text:p text:style-name="P6"/>
      <text:p text:style-name="P8">You are not allowed to use the following characters in your Variable name:</text:p>
      <text:p text:style-name="P8">@ = &amp; | ? &gt; &lt; ^ * / + \ - % ( ) { } ; , <text:span text:style-name="T1">new line</text:span></text:p>
      <text:p text:style-name="P6"><text:line-break/><text:span text:style-name="T2">‘var VARIABLE_NAME = EXPRESSION’</text:span> <text:s/>- Initialize a variable with the value of the expression</text:p>
      <text:p text:style-name="P5">‘VARIABLE_NAME = EXPRESSION’<text:span text:style-name="T3"> <text:s text:c="7"/>- Sets the value of an existing variable to the value of the <text:tab/><text:tab/><text:tab/><text:tab/><text:tab/><text:tab/>expression.<text:line-break/></text:span></text:p>
      <text:p text:style-name="P9"><text:span text:style-name="T2">‘//</text:span><text:span text:style-name="T4">COMMENT’</text:span><text:span text:style-name="T5"><text:tab/><text:tab/><text:tab/> <text:s text:c="9"/>- Comment</text:span></text:p>
      <text:p text:style-name="P9">“ ‘<text:span text:style-name="T6">a’ “<text:tab/><text:tab/><text:tab/><text:tab/><text:tab/> <text:s text:c="9"/>- Sugar to turn ‘a’ into a’s </text:span><text:span text:style-name="T7">ASCII code</text:span></text:p>
      <text:p text:style-name="P10"><text:tab/><text:tab/><text:tab/><text:tab/><text:tab/> <text:s text:c="8"/>→ <text:span text:style-name="T8">Use \’ for ‘</text:span></text:p>
      <text:p text:style-name="P11"><text:span text:style-name="T6">‘ “</text:span><text:span text:style-name="T7">Fake String” <text:s text:c="43"/></text:span><text:span text:style-name="T6">- Sugar to turn “</text:span><text:span text:style-name="T7">Fake String” into the ASII code of each </text:span><text:span text:style-name="T9">→ </text:span><text:span text:style-name="T10">Use whatever formatting you desire for {}</text:span></text:p>
      <text:p text:style-name="P10"><text:tab/><text:tab/><text:tab/><text:tab/><text:tab/> <text:s text:c="8"/>→ <text:span text:style-name="T8">Use \” for “</text:span></text:p>
      <text:p text:style-name="P12">‘<text:span text:style-name="T8">\n’, ‘\\’, ‘\=’</text:span><text:span text:style-name="T7"> <text:s text:c="47"/></text:span><text:span text:style-name="T6">- </text:span><text:span text:style-name="T8">In order: New line symbol, \ symbol and = symbol</text:span></text:p>
      <text:p text:style-name="P12"/>
      <text:p text:style-name="P13">if <text:span text:style-name="T10">CONDITION</text:span> {<text:tab/><text:tab/><text:tab/> <text:s text:c="9"/>- <text:span text:style-name="T10">If statement</text:span></text:p>
      <text:p text:style-name="P14"><text:s text:c="4"/>// Executed if condition is non-zero <text:s text:c="7"/><text:span text:style-name="T9">→ </text:span><text:span text:style-name="T10">Use whatever formatting you desire for {}</text:span></text:p>
      <text:p text:style-name="P15">}<text:tab/><text:tab/><text:tab/><text:tab/><text:tab/> <text:s text:c="8"/><text:span text:style-name="T9">→ </text:span><text:span text:style-name="T11">{} are required to define body</text:span></text:p>
      <text:p text:style-name="P13">else {</text:p>
      <text:p text:style-name="P13"><text:s text:c="4"/>// Executed if condition is zero</text:p>
      <text:p text:style-name="P13">}</text:p>
      <text:p text:style-name="P13"/>
      <text:p text:style-name="P13"/>
      <text:p text:style-name="P13"/>
      <text:p text:style-name="P16"><text:soft-page-break/>for INIT; COND; UPDATE {<text:tab/><text:tab/> <text:s text:c="9"/><text:span text:style-name="T12">- </text:span>Classic for loop</text:p>
      <text:p text:style-name="P16"><text:s text:c="4"/>// Code to execute<text:tab/><text:tab/><text:tab/> <text:s text:c="8"/><text:span text:style-name="T9">→ </text:span><text:span text:style-name="T13">Same {} logic as in if.</text:span></text:p>
      <text:p text:style-name="P16">}<text:tab/><text:tab/><text:tab/><text:tab/><text:tab/> <text:s text:c="8"/><text:span text:style-name="T9">→ </text:span>INIT gets executed before loop (can define variable)</text:p>
      <text:p text:style-name="P17"><text:tab/><text:tab/><text:tab/><text:tab/><text:tab/> <text:s text:c="8"/>→ <text:span text:style-name="T14">COND is the condition for the body to execute</text:span></text:p>
      <text:p text:style-name="P17"><text:tab/><text:tab/><text:tab/><text:tab/><text:tab/> <text:s text:c="8"/>→ <text:span text:style-name="T14">UPDATE is called after each iteration</text:span></text:p>
      <text:p text:style-name="P18">Arithmetic Expressions:</text:p>
      <text:p text:style-name="P9"/>
      <text:p text:style-name="P9"><text:span text:style-name="T2">‘FUNCTION_NAME(ARGUMENTS)’ </text:span><text:s text:c="6"/>- Call a function</text:p>
      <text:p text:style-name="P9"><text:span text:style-name="T2">‘(EXPRESSION)’ </text:span><text:s text:c="10"/><text:tab/><text:tab/> <text:s text:c="8"/>- Classical mathematic parenthesis</text:p>
      <text:p text:style-name="P9">‘V1<text:span text:style-name="T15">^</text:span>V2’<text:tab/><text:tab/><text:tab/><text:tab/> <text:s text:c="8"/>- <text:span text:style-name="T15">Raises V1 to the power of V2</text:span></text:p>
      <text:p text:style-name="P9">‘V1<text:span text:style-name="T15">*</text:span>V2’<text:tab/><text:tab/><text:tab/><text:tab/> <text:s text:c="8"/>- <text:span text:style-name="T15">Multiplication</text:span></text:p>
      <text:p text:style-name="P19">‘V1/V2’<text:tab/><text:tab/><text:tab/><text:tab/> <text:s text:c="8"/>- <text:span text:style-name="T15">Division</text:span></text:p>
      <text:p text:style-name="P19">‘V1%V2’<text:tab/><text:tab/><text:tab/><text:tab/> <text:s text:c="8"/>- <text:span text:style-name="T15">Non-negative safe modulo</text:span></text:p>
      <text:p text:style-name="P19">‘V1+V2’<text:tab/><text:tab/><text:tab/><text:tab/> <text:s text:c="8"/>- <text:span text:style-name="T15">Sum</text:span></text:p>
      <text:p text:style-name="P19">‘V1-V2’<text:tab/><text:tab/><text:tab/><text:tab/> <text:s text:c="8"/>- <text:span text:style-name="T15">Difference</text:span></text:p>
      <text:p text:style-name="P19">‘V1<text:span text:style-name="T15">&amp;</text:span>V2’<text:tab/><text:tab/><text:tab/><text:tab/> <text:s text:c="8"/>- <text:span text:style-name="T15">Return 1 if both V1 AND V2 are 1, else 0</text:span></text:p>
      <text:p text:style-name="P19">‘V1<text:span text:style-name="T15">|</text:span>V2’<text:tab/><text:tab/><text:tab/><text:tab/> <text:s text:c="8"/>- <text:span text:style-name="T15">Return 1 if V1 OR v2 are 1, else 0</text:span></text:p>
      <text:p text:style-name="P19">‘V1?V2’<text:tab/><text:tab/><text:tab/><text:tab/> <text:s text:c="8"/>- <text:span text:style-name="T16">Return 1 if V1 equals V2</text:span></text:p>
      <text:p text:style-name="P19">‘V1&gt;V2’<text:tab/><text:tab/><text:tab/><text:tab/> <text:s text:c="8"/>- <text:span text:style-name="T16">Return 1 if V1 is greater then V2</text:span></text:p>
      <text:p text:style-name="P19">‘V1&lt;V2’<text:tab/><text:tab/><text:tab/><text:tab/> <text:s text:c="8"/>- <text:span text:style-name="T16">Return 1 if V1 is less then V2</text:span></text:p>
      <text:p text:style-name="P19"/>
      <text:p text:style-name="P19"/>
      <text:p text:style-name="P19"/>
      <text:p text:style-name="P19"/>
      <text:p text:style-name="P19"/>
      <text:p text:style-name="P19"/>
      <text:p text:style-name="P20">Built-in Functions</text:p>
      <text:p text:style-name="P21"/>
      <text:p text:style-name="P22">sin, cos, tan, asin, acos (radian)<text:tab/> <text:s text:c="8"/>- Return the mathematical value of the function.</text:p>
      <text:p text:style-name="P22">atan2(y, x)<text:tab/><text:tab/><text:tab/><text:tab/> <text:s text:c="8"/>- Return the mathematical value of the function.</text:p>
      <text:p text:style-name="P23">root(a, n)<text:tab/><text:tab/><text:tab/><text:tab/> <text:s text:c="8"/>- Return the nth root of a.</text:p>
      <text:p text:style-name="P24">sqrt(a)<text:tab/><text:tab/><text:tab/><text:tab/><text:tab/> <text:s text:c="8"/>- Short for root(a, 0.5).</text:p>
      <text:p text:style-name="P24"/>
      <text:p text:style-name="P23">not(a)<text:tab/><text:tab/><text:tab/><text:tab/><text:tab/> <text:s text:c="8"/>- Return 0 if a is non-zero, else 1.</text:p>
      <text:p text:style-name="P25"/>
      <text:p text:style-name="P26"><text:span text:style-name="T17">round</text:span>(a)<text:tab/><text:tab/><text:tab/><text:tab/> <text:s text:c="8"/>- <text:span text:style-name="T17">Returns the rounded value of a.</text:span></text:p>
      <text:p text:style-name="P26"><text:span text:style-name="T17">ceil</text:span>(a)<text:tab/><text:tab/><text:tab/><text:tab/> <text:s text:c="4"/><text:tab/> <text:s text:c="8"/>- <text:span text:style-name="T17">Returns the ceiled value of a.</text:span></text:p>
      <text:p text:style-name="P26"><text:span text:style-name="T17">floor</text:span>(a)<text:tab/><text:tab/><text:tab/><text:tab/> <text:s text:c="8"/>- <text:span text:style-name="T17">Returns the floored value of a.</text:span></text:p>
      <text:p text:style-name="P26"/>
      <text:p text:style-name="P27"><text:span text:style-name="T18">time</text:span>()<text:tab/><text:tab/><text:tab/><text:tab/><text:tab/> <text:s text:c="8"/>- <text:span text:style-name="T18">Returns the system time in ms since epoch.</text:span></text:p>
      <text:p text:style-name="P26"/>
      <text:p text:style-name="P25">ascii(a, b, c, …)<text:tab/><text:tab/><text:tab/> <text:s text:c="8"/>- Interpret each element as ascii:</text:p>
      <text:p text:style-name="P25"><text:tab/><text:tab/><text:tab/><text:tab/><text:tab/> <text:s text:c="7"/>→ for a, it prints the ascii char with index: floor(a%256)</text:p>
      <text:p text:style-name="P28"><text:tab/><text:tab/><text:tab/><text:tab/><text:tab/> <text:s text:c="7"/>→ <text:span text:style-name="T19">Due to limitations, returns a copy of the first variable</text:span></text:p>
      <text:p text:style-name="P25">print(a, b, c, …)<text:tab/><text:tab/><text:tab/> <text:s text:c="8"/>- Prints arguments in decimal notation with 2 decimal</text:p>
      <text:p text:style-name="P25"><text:tab/><text:tab/><text:tab/><text:tab/><text:tab/><text:tab/>precision. Separated by “, “.</text:p>
      <text:p text:style-name="P28"><text:tab/><text:tab/><text:tab/><text:tab/><text:tab/> <text:s text:c="7"/>→ <text:span text:style-name="T19">Due to limitations, returns a copy of the first variable</text:span></text:p>
      <text:p text:style-name="P25"/>
      <text:p text:style-name="P29">ONLY FUNCTIONS WITHOUT COPIES:</text:p>
      <text:p text:style-name="P30">it(a)<text:tab/><text:tab/><text:tab/><text:tab/><text:tab/> <text:s text:c="8"/>- “Iterate”. Increase value of a by 1 <text:span text:style-name="T20">and return </text:span><text:span text:style-name="T21">a copy</text:span><text:span text:style-name="T20">.</text:span></text:p>
      <text:p text:style-name="P30">i<text:span text:style-name="T22">a</text:span>(a)<text:tab/><text:tab/><text:tab/><text:tab/><text:tab/> <text:s text:c="8"/>- “Iterate <text:span text:style-name="T22">After</text:span>”. <text:span text:style-name="T22">Return copy, then increase value of a by <text:tab/><text:tab/><text:tab/><text:tab/><text:tab/><text:tab/>1.</text:span></text:p>
      <text:p text:style-name="P25"><text:soft-page-break/></text:p>
      <text:p text:style-name="P31">Planned features:</text:p>
      <text:list text:style-name="L1">
        <text:list-item>
          <text:p text:style-name="P32">Functions</text:p>
        </text:list-item>
      </text:list>
      <text:list text:style-name="L2">
        <text:list-item>
          <text:p text:style-name="P33">Lists with simple operations (<text:span text:style-name="T23">dynamically</text:span> allocated, <text:span text:style-name="T24">int ids starting from 0, vars are references</text:span>)</text:p>
        </text:list-item>
        <text:list-item>
          <text:p text:style-name="P34">Formatted printing</text:p>
          <text:list>
            <text:list-item>
              <text:list>
                <text:list-item>
                  <text:p text:style-name="P34">printf(“Number %n, List as numbers %l, List as ‘String’ %s !%e. And also percent bcs why not %%.%n”, 1, number, numbersStartPrint, numbersEndExclusive, string, stringStartPrint, stringEndPrint)</text:p>
                </text:list-item>
              </text:list>
            </text:list-item>
          </text:list>
        </text:list-item>
        <text:list-item>
          <text:p text:style-name="P35">sleep(ms)</text:p>
        </text:list-item>
        <text:list-item>
          <text:p text:style-name="P35">min(list), max(list)</text:p>
        </text:list-item>
        <text:list-item>
          <text:p text:style-name="P35">clamp(val, min, max)</text:p>
        </text:list-item>
        <text:list-item>
          <text:p text:style-name="P36">Assembly optimiz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0:46:21.814800585</meta:creation-date>
    <dc:date>2025-09-04T00:09:20.014127169</dc:date>
    <meta:editing-duration>PT5H38M53S</meta:editing-duration>
    <meta:editing-cycles>36</meta:editing-cycles>
    <meta:generator>LibreOffice/25.2.3.2$Linux_X86_64 LibreOffice_project/520$Build-2</meta:generator>
    <meta:document-statistic meta:table-count="0" meta:image-count="0" meta:object-count="0" meta:page-count="3" meta:paragraph-count="74" meta:word-count="749" meta:character-count="4709" meta:non-whitespace-character-count="3402"/>
  </office:meta>
</office:document-meta>
</file>